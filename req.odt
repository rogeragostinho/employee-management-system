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954cm" table:align="left"/>
    </style:style>
    <style:style style:name="Tabela1.A" style:family="table-column">
      <style:table-column-properties style:column-width="6.787cm"/>
    </style:style>
    <style:style style:name="Tabela1.B" style:family="table-column">
      <style:table-column-properties style:column-width="1.667cm"/>
    </style:style>
    <style:style style:name="Tabela1.C" style:family="table-column">
      <style:table-column-properties style:column-width="2.49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Standard">
      <style:text-properties officeooo:rsid="0018d01f" officeooo:paragraph-rsid="0018d01f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18d01f"/>
    </style:style>
    <style:style style:name="T1" style:family="text">
      <style:text-properties officeooo:rsid="0018d0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utenticação e autorização:</text:span></text:p>
      <text:list xml:id="list2802771311" text:style-name="L1">
        <text:list-item>
          <text:p text:style-name="P1">Registo e login com JWT </text:p>
        </text:list-item>
        <text:list-item>
          <text:p text:style-name="P1">Dois roles: <text:span text:style-name="Source_20_Text">ADMIN</text:span> e <text:span text:style-name="Source_20_Text">MANAGER</text:span> </text:p>
        </text:list-item>
        <text:list-item>
          <text:p text:style-name="P2">Rotas protegidas por role </text:p>
        </text:list-item>
      </text:list>
      <text:p text:style-name="Text_20_body"><text:span text:style-name="Strong_20_Emphasis">Gestão de funcionários:</text:span></text:p>
      <text:list text:style-name="L2">
        <text:list-item>
          <text:p text:style-name="P3">CRUD completo de funcionários </text:p>
        </text:list-item>
        <text:list-item>
          <text:p text:style-name="P3">Associar funcionário a departamento </text:p>
        </text:list-item>
        <text:list-item>
          <text:p text:style-name="P3">Filtrar por departamento, cargo, status </text:p>
        </text:list-item>
        <text:list-item>
          <text:p text:style-name="P4">Paginação nos resultados </text:p>
        </text:list-item>
      </text:list>
      <text:p text:style-name="Text_20_body"><text:span text:style-name="Strong_20_Emphasis">Departamentos:</text:span></text:p>
      <text:list text:style-name="L3">
        <text:list-item>
          <text:p text:style-name="P5">CRUD de departamentos </text:p>
        </text:list-item>
        <text:list-item>
          <text:p text:style-name="P6">Listar funcionários por departamento </text:p>
        </text:list-item>
      </text:list>
      <text:p text:style-name="Text_20_body"><text:span text:style-name="Strong_20_Emphasis">Férias:</text:span></text:p>
      <text:list text:style-name="L4">
        <text:list-item>
          <text:p text:style-name="P7">Funcionário solicita férias </text:p>
        </text:list-item>
        <text:list-item>
          <text:p text:style-name="P7">Admin/<text:span text:style-name="T1">manager</text:span> aprova ou rejeita </text:p>
        </text:list-item>
        <text:list-item>
          <text:p text:style-name="P8">Validação de dias disponíveis </text:p>
        </text:list-item>
      </text:list>
      <text:p text:style-name="Text_20_body"><text:span text:style-name="Strong_20_Emphasis">Relatórios simples: </text:span></text:p>
      <text:list text:style-name="L5">
        <text:list-item>
          <text:p text:style-name="P9">Total de funcionários por departamento </text:p>
        </text:list-item>
        <text:list-item>
          <text:p text:style-name="P9">Funcionários de férias no momento </text:p>
        </text:list-item>
        <text:list-item>
          <text:p text:style-name="P10">Headcount geral<text:span text:style-name="T1"><text:line-break/></text:span></text:p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Ação</text:p>
            </table:table-cell>
            <table:table-cell table:style-name="Tabela1.A1" office:value-type="string">
              <text:p text:style-name="Table_20_Heading">ADMIN</text:p>
            </table:table-cell>
            <table:table-cell table:style-name="Tabela1.A1" office:value-type="string">
              <text:p text:style-name="Table_20_Heading">MANAGER</text:p>
            </table:table-cell>
          </table:table-row>
        </table:table-header-rows>
        <table:table-row>
          <table:table-cell table:style-name="Tabela1.A1" office:value-type="string">
            <text:p text:style-name="Table_20_Contents">Criar/eliminar departamento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Criar/eliminar funcionário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todos os funcionários da empresa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funcionários do seu departamento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Aprovar/rejeitar férias (qualquer dept.)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Aprovar/rejeitar férias (seu dept.)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Ver relatórios globai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  <table:table-row>
          <table:table-cell table:style-name="Tabela1.A1" office:value-type="string">
            <text:p text:style-name="Table_20_Contents">Ver relatórios do seu departamento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✅</text:p>
          </table:table-cell>
        </table:table-row>
        <table:table-row>
          <table:table-cell table:style-name="Tabela1.A1" office:value-type="string">
            <text:p text:style-name="Table_20_Contents">Criar outros admins/managers</text:p>
          </table:table-cell>
          <table:table-cell table:style-name="Tabela1.A1" office:value-type="string">
            <text:p text:style-name="Table_20_Contents">✅</text:p>
          </table:table-cell>
          <table:table-cell table:style-name="Tabela1.A1" office:value-type="string">
            <text:p text:style-name="Table_20_Contents">❌</text:p>
          </table:table-cell>
        </table:table-row>
      </table:table>
      <text:p text:style-name="Standard"/>
      <text:p text:style-name="P11">MVP</text:p>
      <text:list text:continue-list="list2802771311" text:style-name="L1">
        <text:list-item>
          <text:p text:style-name="P12">Registo e login com JWT </text:p>
        </text:list-item>
        <text:list-item>
          <text:p text:style-name="P12">CRUD completo de funcionários </text:p>
        </text:list-item>
        <text:list-item>
          <text:p text:style-name="P12">CRUD de departamento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15:10:37.221657464</meta:creation-date>
    <dc:date>2026-05-18T16:36:46.365798480</dc:date>
    <meta:editing-duration>PT1H26M8S</meta:editing-duration>
    <meta:editing-cycles>2</meta:editing-cycles>
    <meta:generator>LibreOffice/26.2.2.2$Linux_X86_64 LibreOffice_project/620$Build-2</meta:generator>
    <meta:document-statistic meta:table-count="1" meta:image-count="0" meta:object-count="0" meta:page-count="1" meta:paragraph-count="54" meta:word-count="156" meta:character-count="955" meta:non-whitespace-character-count="852"/>
  </office:meta>
</office:document-meta>
</file>